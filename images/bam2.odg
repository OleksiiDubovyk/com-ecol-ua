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d4ea6b" loext:fill-use-slide-background="false" draw:opacity="75%" draw:auto-grow-height="false" fo:min-height="7.084cm" fo:min-width="7.084cm" fo:padding-top="0.051cm" fo:padding-bottom="0.051cm" fo:padding-left="0.051cm" fo:padding-right="0.051cm" draw:shadow-opacity="75%" loext:decorative="fals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729fcf" loext:fill-use-slide-background="false" draw:opacity="75%" draw:auto-grow-height="false" fo:min-height="7.186cm" fo:min-width="7.186cm" fo:padding-top="0.051cm" fo:padding-bottom="0.051cm" fo:padding-left="0.051cm" fo:padding-right="0.051cm" draw:shadow-opacity="75%" loext:decorative="false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7d1d5" loext:fill-use-slide-background="false" draw:opacity="75%" draw:auto-grow-height="false" fo:min-height="7.084cm" fo:min-width="7.084cm" fo:padding-top="0.051cm" fo:padding-bottom="0.051cm" fo:padding-left="0.051cm" fo:padding-right="0.051cm" draw:shadow-opacity="75%" loext:decorative="false"/>
    </style:style>
    <style:style style:name="gr4" style:family="graphic" style:parent-style-name="standard">
      <style:graphic-properties draw:stroke="dash" draw:stroke-dash="Dash" svg:stroke-width="0.254cm" svg:stroke-color="#b47804" draw:marker-start-width="0.737cm" draw:marker-end-width="0.737cm" svg:stroke-linecap="round" draw:fill="solid" draw:fill-color="#ffbf00" loext:fill-use-slide-background="false" draw:textarea-horizontal-align="center" draw:textarea-vertical-align="middle" draw:auto-grow-height="false" fo:min-height="7.084cm" fo:min-width="7.084cm" fo:padding-top="0.177cm" fo:padding-bottom="0.177cm" fo:padding-left="0.177cm" fo:padding-right="0.177cm" draw:shadow="hidden" loext:decorative="false"/>
    </style:style>
    <style:style style:name="gr5" style:family="graphic" style:parent-style-name="standard">
      <style:graphic-properties draw:stroke="solid" svg:stroke-width="0.254cm" svg:stroke-color="#ff0000" draw:marker-start-width="0.737cm" draw:marker-end-width="0.737cm" draw:fill="solid" draw:fill-color="#ff6d6d" loext:fill-use-slide-background="false" draw:textarea-horizontal-align="center" draw:textarea-vertical-align="middle" draw:auto-grow-height="false" fo:min-height="7.084cm" fo:min-width="7.084cm" fo:padding-top="0.178cm" fo:padding-bottom="0.178cm" fo:padding-left="0.178cm" fo:padding-right="0.178cm" draw:shadow="hidden" loext:decorative="false"/>
    </style:style>
    <style:style style:name="gr6" style:family="graphic" style:parent-style-name="standard">
      <style:graphic-properties svg:stroke-width="0.102cm" svg:stroke-color="#000000" draw:marker-start-width="0.356cm" draw:marker-end-width="0.356cm" draw:fill="none" draw:fill-color="#729fcf" loext:fill-use-slide-background="false" draw:auto-grow-height="false" fo:min-height="7.084cm" fo:min-width="7.084cm" fo:padding-top="0.051cm" fo:padding-bottom="0.051cm" fo:padding-left="0.051cm" fo:padding-right="0.051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5cm" fo:min-width="7.3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ash_20__28_Rounded_29_" svg:stroke-width="0.102cm" svg:stroke-color="#b47804" draw:marker-start-width="0.356cm" draw:marker-end-width="0.356cm" svg:stroke-linecap="round" draw:fill="none" fo:padding-top="0.051cm" fo:padding-bottom="0.051cm" fo:padding-left="0.051cm" fo:padding-right="0.051cm" loext:decorative="false"/>
    </style:style>
    <style:style style:name="gr11" style:family="graphic" style:parent-style-name="objectwithoutfill">
      <style:graphic-properties draw:stroke="solid" draw:stroke-dash="Dash_20__28_Rounded_29_" svg:stroke-width="0.102cm" svg:stroke-color="#ff0000" draw:marker-start-width="0.356cm" draw:marker-end-width="0.356cm" svg:stroke-linecap="round" draw:fill="none" fo:padding-top="0.051cm" fo:padding-bottom="0.051cm" fo:padding-left="0.051cm" fo:padding-right="0.051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4ea6b" draw:opacity="75%"/>
      <style:paragraph-properties fo:text-align="center"/>
    </style:style>
    <style:style style:name="P2" style:family="paragraph">
      <loext:graphic-properties draw:fill="solid" draw:fill-color="#729fcf" draw:opacity="75%"/>
      <style:paragraph-properties fo:text-align="center"/>
    </style:style>
    <style:style style:name="P3" style:family="paragraph">
      <loext:graphic-properties draw:fill="solid" draw:fill-color="#f7d1d5" draw:opacity="75%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Ubuntu"/>
    </style:style>
    <style:style style:name="P9" style:family="paragraph">
      <loext:graphic-properties draw:fill="none" draw:fill-color="#ffffff"/>
      <style:text-properties style:font-name="Ubuntu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Ubuntu"/>
    </style:style>
    <style:style style:name="T1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Ubuntu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16cm" svg:height="10.16cm" svg:x="3.5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0.16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5.182cm" svg:height="8.917cm" svg:x="6.024cm" svg:y="6.703cm" svg:viewBox="0 0 5183 8918" svg:d="M5008 5787c-115 431-287 847-512 1238-226 390-500 747-816 1062-316 316-673 591-1063 816-8 5-17 10-25 15-9-5-18-10-26-15-390-225-747-500-1063-816-316-315-590-672-816-1062-225-391-397-807-512-1238-116-431-175-878-175-1328 0-451 59-897 175-1328 115-432 287-848 512-1238 226-390 500-747 816-1063s673-590 1063-815c8-5 17-10 26-15 8 5 17 10 25 15 390 225 747 499 1063 815s590 673 816 1063c225 390 397 806 512 1238 116 431 175 877 175 1328 0 450-59 897-175 1328z">
          <text:p/>
        </draw:path>
        <draw:path draw:style-name="gr5" draw:text-style-name="P5" draw:layer="layout" svg:width="4.763cm" svg:height="4.157cm" svg:x="6.244cm" svg:y="6.894cm" svg:viewBox="0 0 4764 4158" svg:d="M3621 3997c-402 107-819 161-1239 161s-837-54-1239-161c-398-105-783-261-1143-466 27-218 70-433 127-645 108-397 268-781 478-1141 210-359 467-688 761-980 295-291 628-544 992-751 8-5 16-9 24-14 8 5 16 9 24 14 364 207 697 460 991 751 295 292 551 621 761 980 210 360 371 744 479 1141 57 212 99 427 127 645-361 205-745 361-1143 466z">
          <text:p/>
        </draw:path>
        <draw:custom-shape draw:style-name="gr6" draw:text-style-name="P6" draw:layer="layout" svg:width="10.16cm" svg:height="10.16cm" svg:x="3.5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0.16cm" svg:height="10.16cm" svg:x="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0.16cm" svg:height="10.16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6.854cm" svg:height="2.297cm" svg:x="5.155cm" svg:y="3.597cm">
          <draw:text-box>
            <text:p text:style-name="P7"><text:span text:style-name="T1"/></text:p>
            <text:p text:style-name="P7"><text:span text:style-name="T2">Середовище, в яке вид</text:span><text:span text:style-name="T2"><text:line-break/></text:span><text:span text:style-name="T2">може мігрувати</text:span></text:p>
          </draw:text-box>
        </draw:frame>
        <draw:frame draw:style-name="gr8" draw:text-style-name="P8" draw:layer="layout" svg:width="7.263cm" svg:height="1.585cm" draw:transform="rotate (-1.0471975511966) translate (2.612cm 8.792cm)">
          <draw:text-box>
            <text:p text:style-name="P7"><text:span text:style-name="T1"/></text:p>
            <text:p text:style-name="P7"><text:span text:style-name="T2">Придатні біотичні </text:span><text:span text:style-name="T2">умови</text:span></text:p>
          </draw:text-box>
        </draw:frame>
        <draw:frame draw:style-name="gr7" draw:text-style-name="P8" draw:layer="layout" svg:width="7.589cm" svg:height="1.585cm" draw:transform="rotate (1.0471975511966) translate (10.654cm 14.918cm)">
          <draw:text-box>
            <text:p text:style-name="P7"><text:span text:style-name="T1"/></text:p>
            <text:p text:style-name="P7"><text:span text:style-name="T2">Придатні абіотичні умови</text:span></text:p>
          </draw:text-box>
        </draw:frame>
        <draw:frame draw:style-name="gr9" draw:text-style-name="P9" draw:layer="layout" svg:width="1.132cm" svg:height="1.428cm" svg:x="8.107cm" svg:y="2.462cm">
          <draw:text-box>
            <text:p><text:span text:style-name="T3">М</text:span></text:p>
          </draw:text-box>
        </draw:frame>
        <draw:frame draw:style-name="gr9" draw:text-style-name="P9" draw:layer="layout" svg:width="0.844cm" svg:height="1.428cm" svg:x="4.314cm" svg:y="11.16cm">
          <draw:text-box>
            <text:p><text:span text:style-name="T3">В</text:span></text:p>
          </draw:text-box>
        </draw:frame>
        <draw:frame draw:style-name="gr9" draw:text-style-name="P9" draw:layer="layout" svg:width="0.895cm" svg:height="1.428cm" svg:x="12.071cm" svg:y="11.16cm">
          <draw:text-box>
            <text:p><text:span text:style-name="T3">А</text:span></text:p>
          </draw:text-box>
        </draw:frame>
        <draw:line draw:style-name="gr10" draw:text-style-name="P10" draw:layer="layout" svg:x1="9.016cm" svg:y1="6.703cm" svg:x2="14.986cm" svg:y2="6.703cm">
          <text:p/>
        </draw:line>
        <draw:line draw:style-name="gr10" draw:text-style-name="P10" draw:layer="layout" svg:x1="9.017cm" svg:y1="15.711cm" svg:x2="14.967cm" svg:y2="15.711cm">
          <text:p/>
        </draw:line>
        <draw:line draw:style-name="gr10" draw:text-style-name="P10" draw:layer="layout" svg:x1="14.967cm" svg:y1="15.711cm" svg:x2="17.519cm" svg:y2="11.15cm">
          <text:p/>
        </draw:line>
        <draw:line draw:style-name="gr10" draw:text-style-name="P10" draw:layer="layout" svg:x1="17.519cm" svg:y1="11.15cm" svg:x2="14.986cm" svg:y2="6.703cm">
          <text:p/>
        </draw:line>
        <draw:line draw:style-name="gr11" draw:text-style-name="P10" draw:layer="layout" svg:x1="8.6cm" svg:y1="9.274cm" svg:x2="14.949cm" svg:y2="4.8cm">
          <text:p/>
        </draw:line>
        <draw:frame draw:style-name="gr12" draw:text-style-name="P12" draw:layer="layout" svg:width="6.374cm" svg:height="1.745cm" svg:x="15.056cm" svg:y="3.779cm">
          <draw:text-box>
            <text:p text:style-name="P11"><text:span text:style-name="T1">Реалізоване </text:span><text:span text:style-name="T1"><text:line-break/></text:span><text:span text:style-name="T1">поширення виду</text:span></text:p>
          </draw:text-box>
        </draw:frame>
        <draw:frame draw:style-name="gr12" draw:text-style-name="P12" draw:layer="layout" svg:width="6.135cm" svg:height="2.617cm" svg:x="17.651cm" svg:y="9.788cm">
          <draw:text-box>
            <text:p text:style-name="P11"><text:span text:style-name="T1">Потенційне </text:span><text:span text:style-name="T1"><text:line-break/></text:span><text:span text:style-name="T1">поширення</text:span></text:p>
            <text:p text:style-name="P11"><text:span text:style-name="T4">(придатні умови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6-06-15T09:53:49.602138687</dc:date>
    <dc:creator>Oleksii Dubovyk</dc:creator>
    <meta:editing-duration>PT1H14M22S</meta:editing-duration>
    <meta:editing-cycles>17</meta:editing-cycles>
    <meta:generator>LibreOffice/25.8.0.4$Linux_X86_64 LibreOffice_project/48f00303701489684e67c38c28aff00cd5929e67</meta:generator>
    <meta:document-statistic meta:object-count="21"/>
  </office:meta>
</office:document-meta>
</file>