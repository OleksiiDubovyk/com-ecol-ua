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86A3CE54C5.png" manifest:media-type="image/png"/>
  <manifest:file-entry manifest:full-path="Pictures/10000001000007D000000586425AE5FD.png" manifest:media-type="image/png"/>
  <manifest:file-entry manifest:full-path="Pictures/10000001000007D000000586D62728C2.png" manifest:media-type="image/png"/>
  <manifest:file-entry manifest:full-path="Pictures/10000001000007D00000058616ECEC97.png" manifest:media-type="image/png"/>
  <manifest:file-entry manifest:full-path="Pictures/10000001000007D000000586A3DC2CE3.png" manifest:media-type="image/png"/>
  <manifest:file-entry manifest:full-path="Pictures/10000001000007D00000058620AD09C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666666" draw:textarea-vertical-align="middle" draw:auto-grow-height="false" fo:min-height="2.655cm" fo:min-width="2.405cm" loext:decorative="false"/>
    </style:style>
    <style:style style:name="gr4" style:family="graphic" style:parent-style-name="standard">
      <style:graphic-properties draw:stroke="none" draw:fill="solid" draw:fill-color="#666666" draw:textarea-vertical-align="middle" draw:auto-grow-height="false" fo:min-height="0.264cm" fo:min-width="0.9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Ubuntu"/>
    </style:style>
    <style:style style:name="P3" style:family="paragraph">
      <loext:graphic-properties draw:fill="solid" draw:fill-color="#666666"/>
      <style:paragraph-properties fo:text-align="center"/>
    </style:style>
    <style:style style:name="T1" style:family="text">
      <style:text-properties style:font-name="Ubuntu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81cm" svg:height="7.62cm" svg:x="0.047cm" svg:y="0.047cm">
          <draw:image xlink:href="Pictures/10000001000007D00000058620AD09CA.png" xlink:type="simple" xlink:show="embed" xlink:actuate="onLoad" draw:mime-type="image/png">
            <text:p/>
          </draw:image>
        </draw:frame>
        <draw:frame draw:style-name="gr1" draw:text-style-name="P1" draw:layer="layout" svg:width="10.86cm" svg:height="7.675cm" svg:x="10.828cm" svg:y="-0.008cm">
          <draw:image xlink:href="Pictures/10000001000007D000000586A3DC2CE3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63cm" svg:x="0.047cm" svg:y="7.657cm">
          <draw:image xlink:href="Pictures/10000001000007D000000586D62728C2.png" xlink:type="simple" xlink:show="embed" xlink:actuate="onLoad" draw:mime-type="image/png">
            <text:p/>
          </draw:image>
        </draw:frame>
        <draw:frame draw:style-name="gr1" draw:text-style-name="P1" draw:layer="layout" svg:width="10.782cm" svg:height="7.62cm" svg:x="10.842cm" svg:y="7.667cm">
          <draw:image xlink:href="Pictures/10000001000007D000000586425AE5FD.png" xlink:type="simple" xlink:show="embed" xlink:actuate="onLoad" draw:mime-type="image/png">
            <text:p/>
          </draw:image>
        </draw:frame>
        <draw:frame draw:style-name="gr1" draw:text-style-name="P1" draw:layer="layout" svg:width="10.781cm" svg:height="7.62cm" svg:x="0.047cm" svg:y="15.287cm">
          <draw:image xlink:href="Pictures/10000001000007D00000058616ECEC97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631cm" svg:x="10.828cm" svg:y="15.287cm">
          <draw:image xlink:href="Pictures/10000000000007D000000586A3CE54C5.png" xlink:type="simple" xlink:show="embed" xlink:actuate="onLoad" draw:mime-type="image/png">
            <text:p/>
          </draw:image>
        </draw:frame>
        <draw:frame draw:style-name="gr2" draw:text-style-name="P2" draw:layer="layout" svg:width="1.27cm" svg:height="1.513cm" svg:x="11.16cm" svg:y="15.362cm">
          <draw:text-box>
            <text:p><text:span text:style-name="T1">f</text:span></text:p>
          </draw:text-box>
        </draw:frame>
        <draw:custom-shape draw:style-name="gr3" draw:text-style-name="P3" draw:layer="layout" svg:width="2.904cm" svg:height="2.904cm" svg:x="7.35cm" svg:y="6.351cm">
          <text:p/>
          <draw:enhanced-geometry svg:viewBox="0 0 21600 21600" draw:text-areas="0 0 21600 21600" draw:type="circular-arrow" draw:modifiers="-89.0863548854189 64.8760481150442 6768.265743918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3" draw:text-style-name="P3" draw:layer="layout" svg:width="2.904cm" svg:height="2.904cm" svg:x="18.145cm" svg:y="6.397cm">
          <text:p/>
          <draw:enhanced-geometry svg:viewBox="0 0 21600 21600" draw:text-areas="0 0 21600 21600" draw:type="circular-arrow" draw:modifiers="-89.0863548854189 64.8760481150442 6768.265743918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4" draw:text-style-name="P3" draw:layer="layout" svg:width="1.634cm" svg:height="1.026cm" svg:x="9.194cm" svg:y="20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634cm" svg:height="1.026cm" draw:transform="rotate (-1.5707963267949) translate (16.852cm 13.7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634cm" svg:height="1.026cm" draw:transform="rotate (-0.785398163397449) translate (9.673cm 13.5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6-06-14T19:47:14.242895783</dc:date>
    <dc:creator>Oleksii Dubovyk</dc:creator>
    <meta:editing-duration>PT47M</meta:editing-duration>
    <meta:editing-cycles>10</meta:editing-cycles>
    <meta:generator>LibreOffice/25.8.0.4$Linux_X86_64 LibreOffice_project/48f00303701489684e67c38c28aff00cd5929e67</meta:generator>
    <meta:document-statistic meta:object-count="12"/>
  </office:meta>
</office:document-meta>
</file>